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fo:font-weight="bold" style:font-weight-asian="bold" style:font-weight-complex="bold"/>
    </style:style>
    <style:style style:name="P2" style:family="paragraph" style:parent-style-name="Text_20_body">
      <style:paragraph-properties fo:text-align="justify" style:justify-single-word="false" fo:text-indent="0.7cm" style:auto-text-indent="false"/>
    </style:style>
    <style:style style:name="P3" style:family="paragraph" style:parent-style-name="Text_20_body">
      <style:paragraph-properties fo:text-align="justify" style:justify-single-word="false" fo:text-indent="0.7cm" style:auto-text-indent="false"/>
      <style:text-properties fo:font-style="italic" style:font-style-asian="italic" style:font-style-complex="italic"/>
    </style:style>
    <style:style style:name="P4" style:family="paragraph" style:parent-style-name="Text_20_body">
      <style:paragraph-properties fo:text-align="justify" style:justify-single-word="false"/>
    </style:style>
    <style:style style:name="T1" style:family="text">
      <style:text-properties fo:font-family="'Times New Roman'" style:font-family-generic="roman" style:font-pitch="variable"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ương 2. Các kỹ thuật phát hiện và công cụ phân tích</text:p>
      <text:p text:style-name="P1">2.2. Steganography và Steganalysis</text:p>
      <text:p text:style-name="P1">2.2.1. Khái niệm và phân loại </text:p>
      <text:p text:style-name="P2"><text:span text:style-name="T1">Steganography là kỹ thuật che giấu thông tin trong một đối tượng mang sao cho sự tồn tại của thông tin đó không bị nghi ngờ. Thuật ngữ này có nguồn gốc từ tiếng Hy Lạp, trong đó </text:span><text:span text:style-name="Emphasis"><text:span text:style-name="T1">steganos</text:span></text:span><text:span text:style-name="T1"> nghĩa là “che phủ” và </text:span><text:span text:style-name="Emphasis"><text:span text:style-name="T1">graphein</text:span></text:span><text:span text:style-name="T1"> nghĩa là “viết”, hàm ý việc “viết dưới lớp che giấu”. Khác với mật mã học – nơi thông điệp được mã hóa nhưng vẫn có thể nhận biết rằng đang tồn tại một nội dung bí mật – steganography tập trung vào việc làm cho quá trình truyền thông tin diễn ra một cách tự nhiên và khó bị phát hiện. Nói cách khác, mục tiêu cốt lõi của steganography không chỉ là bảo vệ nội dung mà còn che giấu chính sự hiện diện của thông tin.</text:span></text:p>
      <text:p text:style-name="P2"><text:span text:style-name="T1">Trong môi trường số, steganography thường được triển khai bằng cách nhúng dữ liệu bí mật vào các phương tiện đa phương tiện như ảnh, âm thanh, video hoặc văn bản. Đối tượng dùng để chứa thông tin được gọi là </text:span><text:span text:style-name="Emphasis"><text:span text:style-name="T1">cover object</text:span></text:span><text:span text:style-name="T1">, còn đối tượng sau khi đã nhúng dữ liệu được gọi là </text:span><text:span text:style-name="Emphasis"><text:span text:style-name="T1">stego object</text:span></text:span><text:span text:style-name="T1">. Quá trình nhúng phải đảm bảo rằng sự thay đổi giữa hai đối tượng này là tối thiểu và không gây khác biệt đáng kể về mặt cảm nhận hoặc thống kê. Để đạt được điều đó, các thuật toán giấu tin thường khai thác đặc tính dư thừa hoặc giới hạn cảm nhận của con người đối với dữ liệu số, đặc biệt là trong ảnh số – nơi thị giác con người không nhạy cảm với những thay đổi rất nhỏ ở mức bit.</text:span></text:p>
      <text:p text:style-name="P2">Về mặt mô hình, một hệ thống steganography cơ bản bao gồm ba thành phần chính: thông điệp bí mật, vật mang và thuật toán nhúng. Trong một số trường hợp, hệ thống còn sử dụng thêm khóa bí mật nhằm tăng cường tính bảo mật. Quá trình nhúng chuyển đổi dữ liệu cần giấu sang dạng phù hợp để tích hợp vào vật mang theo một quy tắc xác định. Ở phía nhận, quá trình trích xuất sẽ khôi phục lại thông điệp ban đầu dựa trên thuật toán tương ứng và khóa (nếu có). Mô hình này cho thấy steganography không chỉ là một kỹ thuật chỉnh sửa dữ liệu đơn giản mà là một hệ thống xử lý thông tin có cấu trúc rõ ràng.</text:p>
      <text:p text:style-name="P2">Việc phân loại steganography có thể dựa trên nhiều tiêu chí khác nhau. Dựa trên loại phương tiện sử dụng làm vật mang, steganography được chia thành các nhóm như giấu tin trong ảnh, trong âm thanh, trong video hoặc trong văn bản. Trong đó, giấu tin trong ảnh số là lĩnh vực được nghiên cứu rộng rãi nhất do ảnh có dung lượng lớn, cấu trúc dữ liệu phong phú và tồn tại phổ biến trong môi trường truyền thông hiện đại.</text:p>
      <text:p text:style-name="P2">Một cách phân loại quan trọng khác dựa trên miền thao tác của thuật toán nhúng. Theo đó, các kỹ thuật giấu tin trong ảnh thường được chia thành hai nhóm chính: <text:soft-page-break/>miền không gian (spatial domain) và miền biến đổi (transform domain). Các phương pháp thuộc miền không gian tác động trực tiếp lên giá trị pixel của ảnh, khai thác cấu trúc biểu diễn nhị phân của từng kênh màu. Nhóm này thường có ưu điểm về tính đơn giản và dung lượng giấu tin cao, nhưng có thể dễ bị phát hiện nếu áp dụng các phương pháp phân tích thống kê. Ngược lại, các phương pháp thuộc miền biến đổi thực hiện việc nhúng dữ liệu sau khi ảnh được chuyển sang một miền toán học khác, chẳng hạn thông qua biến đổi cosine rời rạc (DCT) trong ảnh JPEG. Nhờ thao tác trên các hệ số biến đổi thay vì giá trị pixel trực tiếp, các kỹ thuật này thường có khả năng che giấu tốt hơn và bền vững hơn trước các thao tác xử lý như nén lại ảnh.</text:p>
      <text:p text:style-name="P2">Ngoài ra, steganography cũng có thể được phân loại theo cơ chế sử dụng khóa. Một số hệ thống hoạt động mà không cần khóa bí mật, trong khi các hệ thống khác yêu cầu khóa chung hoặc thậm chí áp dụng cơ chế khóa công khai để điều khiển quá trình nhúng và trích xuất. Việc sử dụng khóa giúp tăng cường mức độ bảo mật, đặc biệt trong các môi trường mà nguy cơ bị phân tích steganalysis là đáng kể.</text:p>
      <text:p text:style-name="P2">Trong nghiên cứu hiện đại, một hệ thống steganography thường được đánh giá dựa trên ba tiêu chí cơ bản: tính không thể nhận biết (imperceptibility), dung lượng giấu tin (capacity) và độ bền vững (robustness). Ba yếu tố này tồn tại trong mối quan hệ đánh đổi lẫn nhau: việc tăng dung lượng giấu tin có thể làm giảm tính không thể nhận biết, trong khi việc tăng độ bền vững có thể làm giảm dung lượng khả dụng. Do đó, thiết kế một thuật toán giấu tin hiệu quả đòi hỏi phải cân bằng hợp lý giữa các tiêu chí này tùy theo mục đích sử dụng.</text:p>
      <text:p text:style-name="P2">Nhìn chung, steganography là một lĩnh vực kết hợp giữa xử lý tín hiệu số, lý thuyết thông tin và bảo mật dữ liệu. Việc hiểu rõ khái niệm và các cách phân loại không chỉ giúp làm nền tảng cho việc xây dựng thuật toán giấu tin mà còn đóng vai trò quan trọng trong việc phát triển các kỹ thuật phát hiện thông tin ẩn (steganalysis) – nội dung sẽ được trình bày ở các mục tiếp theo.</text:p>
      <text:p text:style-name="P1">2.2.2. Các phương pháp Steganography trong ảnh số</text:p>
      <text:p text:style-name="P2">Trong ảnh số, các phương pháp steganography được xây dựng dựa trên đặc điểm biểu diễn dữ liệu của ảnh và cơ chế xử lý của từng định dạng. Về mặt kỹ thuật, các phương pháp này thường được chia thành hai nhóm chính: kỹ thuật trong miền không gian (spatial domain) và kỹ thuật trong miền biến đổi (transform domain). Sự phân chia này phản ánh bản chất toán học của quá trình nhúng và có ý nghĩa quan trọng đối với khả năng phát hiện trong steganalysis.</text:p>
      <text:p text:style-name="P3">Kỹ thuật trong miền không gian (Spatial Domain Techniques)</text:p>
      <text:p text:style-name="P2">Các phương pháp thuộc miền không gian tác động trực tiếp lên giá trị pixel của ảnh. Trong ảnh màu RGB, mỗi pixel thường được biểu diễn bằng ba kênh màu với độ <text:soft-page-break/>sâu 8 bit cho mỗi kênh. Điều này cho phép dữ liệu ảnh được biểu diễn dưới dạng nhị phân, tạo điều kiện thuận lợi cho việc thay đổi các bit ít quan trọng mà không gây khác biệt đáng kể về mặt cảm nhận.</text:p>
      <text:p text:style-name="P2">Phương pháp tiêu biểu và phổ biến nhất trong nhóm này là kỹ thuật thay thế bit ít quan trọng nhất, thường được gọi là Least Significant Bit (LSB). Ý tưởng cốt lõi của LSB là thay đổi bit có trọng số thấp nhất trong biểu diễn nhị phân của giá trị pixel để nhúng từng bit của thông điệp bí mật. Do bit này chỉ đóng góp một phần rất nhỏ vào giá trị cường độ màu, sự thay đổi thường không thể nhận biết bằng mắt thường nếu dung lượng nhúng ở mức hợp lý.</text:p>
      <text:p text:style-name="P2">Tuy nhiên, mặc dù đơn giản và có dung lượng giấu tin cao, các kỹ thuật LSB có thể làm thay đổi phân bố thống kê của các giá trị pixel. Sự thay đổi này, dù nhỏ, có thể bị khai thác bởi các phương pháp steganalysis dựa trên phân tích thống kê hoặc học máy. Do đó, các biến thể nâng cao của LSB đã được đề xuất nhằm giảm thiểu dấu hiệu bất thường, chẳng hạn như lựa chọn vị trí nhúng theo một khóa giả ngẫu nhiên hoặc điều chỉnh xác suất thay đổi bit.</text:p>
      <text:p text:style-name="P2">Ngoài LSB, miền không gian còn bao gồm các kỹ thuật dựa trên điều chỉnh cặp pixel (pixel-value differencing) hoặc khai thác mối quan hệ giữa các điểm ảnh lân cận. Những phương pháp này cố gắng phân bổ dữ liệu nhúng theo đặc trưng nội tại của ảnh nhằm giảm thiểu khả năng bị phát hiện.</text:p>
      <text:p text:style-name="P3">Kỹ thuật trong miền biến đổi (Transform Domain Techniques)</text:p>
      <text:p text:style-name="P2">Khác với miền không gian, các phương pháp trong miền biến đổi không tác động trực tiếp lên giá trị pixel ban đầu mà thực hiện nhúng dữ liệu sau khi ảnh được chuyển sang một miền toán học khác. Cách tiếp cận này đặc biệt phù hợp với các định dạng ảnh nén như JPEG, vốn sử dụng biến đổi cosine rời rạc (Discrete Cosine Transform – DCT) để biểu diễn ảnh trong miền tần số.</text:p>
      <text:p text:style-name="P2">Trong quy trình nén JPEG, ảnh được chia thành các khối nhỏ (thường là 8×8 pixel), sau đó mỗi khối được biến đổi sang miền tần số thông qua DCT. Kết quả của phép biến đổi là một tập hợp các hệ số biểu diễn thành phần tần số thấp và cao. Việc nhúng dữ liệu có thể được thực hiện bằng cách điều chỉnh các hệ số này, thường là ở vùng tần số trung bình để tránh ảnh hưởng lớn đến chất lượng ảnh hoặc bị loại bỏ trong quá trình nén.</text:p>
      <text:p text:style-name="P2">Ưu điểm của phương pháp dựa trên DCT là khả năng che giấu tốt hơn trước các thao tác xử lý như nén lại hoặc chỉnh sửa nhẹ. Do việc nhúng diễn ra ở mức hệ số tần số, sự thay đổi có xu hướng hòa vào cấu trúc nén của ảnh, khiến việc phát hiện trở nên khó khăn hơn so với kỹ thuật miền không gian. Tuy nhiên, sự phức tạp của quá trình xử lý cũng cao hơn, đòi hỏi hiểu biết về cơ chế nén và biến đổi tín hiệu.</text:p>
      <text:p text:style-name="P2"><text:soft-page-break/>Ngoài DCT, các phương pháp khác trong miền biến đổi còn có thể dựa trên biến đổi sóng con rời rạc (Discrete Wavelet Transform – DWT) hoặc các kỹ thuật lai kết hợp nhiều miền khác nhau. Những hướng tiếp cận này thường hướng đến việc cân bằng giữa dung lượng nhúng, tính không thể nhận biết và khả năng chống lại các phương pháp steganalysis hiện đại.</text:p>
      <text:p text:style-name="P3">So sánh tổng quát giữa hai hướng tiếp cận</text:p>
      <text:p text:style-name="P2">Về bản chất, sự khác biệt giữa miền không gian và miền biến đổi nằm ở mức độ can thiệp vào cấu trúc dữ liệu ảnh. Miền không gian đơn giản và trực tiếp, nhưng dễ tạo ra dấu hiệu thống kê bất thường nếu dung lượng nhúng lớn. Miền biến đổi phức tạp hơn nhưng thường bền vững và khó phát hiện hơn. Lựa chọn phương pháp phù hợp phụ thuộc vào mục đích sử dụng, định dạng ảnh và yêu cầu về mức độ bảo mật.</text:p>
      <text:p text:style-name="P2">Sự tồn tại của nhiều phương pháp giấu tin khác nhau cũng là nguyên nhân khiến steganalysis phải phát triển theo hướng đa dạng hóa kỹ thuật phân tích. Mỗi phương pháp nhúng để lại những đặc trưng riêng trong cấu trúc dữ liệu, và việc hiểu rõ nguyên lý hoạt động của từng kỹ thuật là điều kiện tiên quyết để xây dựng mô hình phát hiện hiệu quả.</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4pt" fo:language="vi" fo:country="V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4pt" fo:language="vi" fo:country="V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6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d7d7" style:writing-mode="lr-tb" draw:fill="solid" draw:fill-color="#ffd7d7"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d7d7"/>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3T04:34:45.293821000</meta:creation-date>
    <dc:date>2026-02-13T04:43:09.155089200</dc:date>
    <meta:editing-duration>PT8M24S</meta:editing-duration>
    <meta:editing-cycles>1</meta:editing-cycles>
    <meta:document-statistic meta:table-count="0" meta:image-count="0" meta:object-count="0" meta:page-count="4" meta:paragraph-count="26" meta:word-count="1907" meta:character-count="9113" meta:non-whitespace-character-count="7225"/>
    <meta:generator>LibreOffice/25.8.4.2$Windows_X86_64 LibreOffice_project/290daaa01b999472f0c7a3890eb6a550fd74c6df</meta:generator>
  </office:meta>
</office:document-meta>
</file>